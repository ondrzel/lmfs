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04pt"/>
    </style:style>
    <style:style style:name="co2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Jmé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Σ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f. Gr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:.G2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na Radochová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3:.G3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n Slí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formula="of:=SUM([.B4:.G4])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ěj Gajdoš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5:.G5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6:.G6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7:.G7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e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8:.G8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9:.G9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í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formula="of:=SUM([.B10:.G10]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šk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formula="of:=SUM([.B11:.G11])" office:value-type="float" office:value="10.5" calcext:value-type="float">
            <text:p>10.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7:59:23.021310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6T16:35:45.876850233</meta:creation-date>
    <dc:date>2022-08-06T18:02:13.139757369</dc:date>
    <meta:editing-duration>PT1H22M54S</meta:editing-duration>
    <meta:editing-cycles>5</meta:editing-cycles>
    <meta:generator>LibreOffice/6.0.7.3$Linux_X86_64 LibreOffice_project/00m0$Build-3</meta:generator>
    <meta:document-statistic meta:table-count="1" meta:cell-count="88" meta:object-count="0"/>
  </office:meta>
</office:document-meta>
</file>